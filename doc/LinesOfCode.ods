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49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7823in" svg:height="7.8421in" svg:x="3.1161in" svg:y="0.148in">
            <draw:object draw:notify-on-update-of-ranges="Sheet1.A1:Sheet1.A1 Sheet1.A2:Sheet1.A179 Sheet1.B1:Sheet1.B1 Sheet1.B2:Sheet1.B179 Sheet1.C1:Sheet1.C1 Sheet1.C2:Sheet1.C1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3" office:value-type="string" calcext:value-type="string">
            <text:p>GWT</text:p>
          </table:table-cell>
          <table:table-cell table:style-name="ce3" office:value-type="string" calcext:value-type="string">
            <text:p>All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0" calcext:value-type="float">
            <text:p>0</text:p>
          </table:table-cell>
          <table:table-cell office:value-type="float" office:value="8507" calcext:value-type="float">
            <text:p>8507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0" calcext:value-type="float">
            <text:p>0</text:p>
          </table:table-cell>
          <table:table-cell office:value-type="float" office:value="16084" calcext:value-type="float">
            <text:p>16084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0" calcext:value-type="float">
            <text:p>0</text:p>
          </table:table-cell>
          <table:table-cell office:value-type="float" office:value="16084" calcext:value-type="float">
            <text:p>16084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0" calcext:value-type="float">
            <text:p>0</text:p>
          </table:table-cell>
          <table:table-cell office:value-type="float" office:value="16084" calcext:value-type="float">
            <text:p>16084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9294" calcext:value-type="float">
            <text:p>9294</text:p>
          </table:table-cell>
          <table:table-cell office:value-type="float" office:value="34247" calcext:value-type="float">
            <text:p>34247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9429" calcext:value-type="float">
            <text:p>9429</text:p>
          </table:table-cell>
          <table:table-cell office:value-type="float" office:value="34993" calcext:value-type="float">
            <text:p>3499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4027" calcext:value-type="float">
            <text:p>14027</text:p>
          </table:table-cell>
          <table:table-cell office:value-type="float" office:value="50036" calcext:value-type="float">
            <text:p>50036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6345" calcext:value-type="float">
            <text:p>16345</text:p>
          </table:table-cell>
          <table:table-cell office:value-type="float" office:value="55279" calcext:value-type="float">
            <text:p>55279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4271" calcext:value-type="float">
            <text:p>24271</text:p>
          </table:table-cell>
          <table:table-cell office:value-type="float" office:value="66402" calcext:value-type="float">
            <text:p>66402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43160" calcext:value-type="float">
            <text:p>43160</text:p>
          </table:table-cell>
          <table:table-cell office:value-type="float" office:value="70923" calcext:value-type="float">
            <text:p>70923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47125" calcext:value-type="float">
            <text:p>47125</text:p>
          </table:table-cell>
          <table:table-cell office:value-type="float" office:value="78565" calcext:value-type="float">
            <text:p>78565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47810" calcext:value-type="float">
            <text:p>47810</text:p>
          </table:table-cell>
          <table:table-cell office:value-type="float" office:value="82462" calcext:value-type="float">
            <text:p>82462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50445" calcext:value-type="float">
            <text:p>50445</text:p>
          </table:table-cell>
          <table:table-cell office:value-type="float" office:value="89357" calcext:value-type="float">
            <text:p>89357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53952" calcext:value-type="float">
            <text:p>53952</text:p>
          </table:table-cell>
          <table:table-cell office:value-type="float" office:value="99385" calcext:value-type="float">
            <text:p>99385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57635" calcext:value-type="float">
            <text:p>57635</text:p>
          </table:table-cell>
          <table:table-cell office:value-type="float" office:value="106306" calcext:value-type="float">
            <text:p>106306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59414" calcext:value-type="float">
            <text:p>59414</text:p>
          </table:table-cell>
          <table:table-cell office:value-type="float" office:value="109914" calcext:value-type="float">
            <text:p>109914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61366" calcext:value-type="float">
            <text:p>61366</text:p>
          </table:table-cell>
          <table:table-cell office:value-type="float" office:value="114369" calcext:value-type="float">
            <text:p>114369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1858" calcext:value-type="float">
            <text:p>61858</text:p>
          </table:table-cell>
          <table:table-cell office:value-type="float" office:value="115207" calcext:value-type="float">
            <text:p>11520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61858" calcext:value-type="float">
            <text:p>61858</text:p>
          </table:table-cell>
          <table:table-cell office:value-type="float" office:value="115207" calcext:value-type="float">
            <text:p>11520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65312" calcext:value-type="float">
            <text:p>65312</text:p>
          </table:table-cell>
          <table:table-cell office:value-type="float" office:value="127342" calcext:value-type="float">
            <text:p>127342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70237" calcext:value-type="float">
            <text:p>70237</text:p>
          </table:table-cell>
          <table:table-cell office:value-type="float" office:value="139217" calcext:value-type="float">
            <text:p>139217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73361" calcext:value-type="float">
            <text:p>73361</text:p>
          </table:table-cell>
          <table:table-cell office:value-type="float" office:value="150237" calcext:value-type="float">
            <text:p>150237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75115" calcext:value-type="float">
            <text:p>75115</text:p>
          </table:table-cell>
          <table:table-cell office:value-type="float" office:value="166239" calcext:value-type="float">
            <text:p>166239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6247" calcext:value-type="float">
            <text:p>76247</text:p>
          </table:table-cell>
          <table:table-cell office:value-type="float" office:value="175212" calcext:value-type="float">
            <text:p>175212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6678" calcext:value-type="float">
            <text:p>86678</text:p>
          </table:table-cell>
          <table:table-cell office:value-type="float" office:value="203579" calcext:value-type="float">
            <text:p>203579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89234" calcext:value-type="float">
            <text:p>89234</text:p>
          </table:table-cell>
          <table:table-cell office:value-type="float" office:value="221273" calcext:value-type="float">
            <text:p>221273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92140" calcext:value-type="float">
            <text:p>92140</text:p>
          </table:table-cell>
          <table:table-cell office:value-type="float" office:value="231810" calcext:value-type="float">
            <text:p>231810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02569" calcext:value-type="float">
            <text:p>102569</text:p>
          </table:table-cell>
          <table:table-cell office:value-type="float" office:value="233539" calcext:value-type="float">
            <text:p>233539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02609" calcext:value-type="float">
            <text:p>102609</text:p>
          </table:table-cell>
          <table:table-cell office:value-type="float" office:value="235802" calcext:value-type="float">
            <text:p>235802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05277" calcext:value-type="float">
            <text:p>105277</text:p>
          </table:table-cell>
          <table:table-cell office:value-type="float" office:value="242213" calcext:value-type="float">
            <text:p>242213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109747" calcext:value-type="float">
            <text:p>109747</text:p>
          </table:table-cell>
          <table:table-cell office:value-type="float" office:value="255673" calcext:value-type="float">
            <text:p>25567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10708" calcext:value-type="float">
            <text:p>110708</text:p>
          </table:table-cell>
          <table:table-cell office:value-type="float" office:value="266474" calcext:value-type="float">
            <text:p>266474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10708" calcext:value-type="float">
            <text:p>110708</text:p>
          </table:table-cell>
          <table:table-cell office:value-type="float" office:value="266474" calcext:value-type="float">
            <text:p>266474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15974" calcext:value-type="float">
            <text:p>115974</text:p>
          </table:table-cell>
          <table:table-cell office:value-type="float" office:value="282504" calcext:value-type="float">
            <text:p>282504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14247" calcext:value-type="float">
            <text:p>114247</text:p>
          </table:table-cell>
          <table:table-cell office:value-type="float" office:value="291415" calcext:value-type="float">
            <text:p>29141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06761" calcext:value-type="float">
            <text:p>106761</text:p>
          </table:table-cell>
          <table:table-cell office:value-type="float" office:value="296131" calcext:value-type="float">
            <text:p>296131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17544" calcext:value-type="float">
            <text:p>117544</text:p>
          </table:table-cell>
          <table:table-cell office:value-type="float" office:value="316565" calcext:value-type="float">
            <text:p>316565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23851" calcext:value-type="float">
            <text:p>123851</text:p>
          </table:table-cell>
          <table:table-cell office:value-type="float" office:value="327300" calcext:value-type="float">
            <text:p>327300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127369" calcext:value-type="float">
            <text:p>127369</text:p>
          </table:table-cell>
          <table:table-cell office:value-type="float" office:value="332569" calcext:value-type="float">
            <text:p>332569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133941" calcext:value-type="float">
            <text:p>133941</text:p>
          </table:table-cell>
          <table:table-cell office:value-type="float" office:value="339686" calcext:value-type="float">
            <text:p>339686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136223" calcext:value-type="float">
            <text:p>136223</text:p>
          </table:table-cell>
          <table:table-cell office:value-type="float" office:value="344426" calcext:value-type="float">
            <text:p>344426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139650" calcext:value-type="float">
            <text:p>139650</text:p>
          </table:table-cell>
          <table:table-cell office:value-type="float" office:value="350336" calcext:value-type="float">
            <text:p>350336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139101" calcext:value-type="float">
            <text:p>139101</text:p>
          </table:table-cell>
          <table:table-cell office:value-type="float" office:value="362631" calcext:value-type="float">
            <text:p>362631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42386" calcext:value-type="float">
            <text:p>142386</text:p>
          </table:table-cell>
          <table:table-cell office:value-type="float" office:value="377059" calcext:value-type="float">
            <text:p>377059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143172" calcext:value-type="float">
            <text:p>143172</text:p>
          </table:table-cell>
          <table:table-cell office:value-type="float" office:value="379712" calcext:value-type="float">
            <text:p>379712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44350" calcext:value-type="float">
            <text:p>144350</text:p>
          </table:table-cell>
          <table:table-cell office:value-type="float" office:value="395279" calcext:value-type="float">
            <text:p>395279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46277" calcext:value-type="float">
            <text:p>146277</text:p>
          </table:table-cell>
          <table:table-cell office:value-type="float" office:value="401906" calcext:value-type="float">
            <text:p>401906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152736" calcext:value-type="float">
            <text:p>152736</text:p>
          </table:table-cell>
          <table:table-cell office:value-type="float" office:value="418491" calcext:value-type="float">
            <text:p>418491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59940" calcext:value-type="float">
            <text:p>159940</text:p>
          </table:table-cell>
          <table:table-cell office:value-type="float" office:value="440975" calcext:value-type="float">
            <text:p>440975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61973" calcext:value-type="float">
            <text:p>161973</text:p>
          </table:table-cell>
          <table:table-cell office:value-type="float" office:value="460796" calcext:value-type="float">
            <text:p>460796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69693" calcext:value-type="float">
            <text:p>169693</text:p>
          </table:table-cell>
          <table:table-cell office:value-type="float" office:value="470815" calcext:value-type="float">
            <text:p>470815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77854" calcext:value-type="float">
            <text:p>177854</text:p>
          </table:table-cell>
          <table:table-cell office:value-type="float" office:value="484687" calcext:value-type="float">
            <text:p>484687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77089" calcext:value-type="float">
            <text:p>177089</text:p>
          </table:table-cell>
          <table:table-cell office:value-type="float" office:value="486752" calcext:value-type="float">
            <text:p>486752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78464" calcext:value-type="float">
            <text:p>178464</text:p>
          </table:table-cell>
          <table:table-cell office:value-type="float" office:value="490620" calcext:value-type="float">
            <text:p>490620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81412" calcext:value-type="float">
            <text:p>181412</text:p>
          </table:table-cell>
          <table:table-cell office:value-type="float" office:value="493677" calcext:value-type="float">
            <text:p>49367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182822" calcext:value-type="float">
            <text:p>182822</text:p>
          </table:table-cell>
          <table:table-cell office:value-type="float" office:value="496731" calcext:value-type="float">
            <text:p>496731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183045" calcext:value-type="float">
            <text:p>183045</text:p>
          </table:table-cell>
          <table:table-cell office:value-type="float" office:value="494210" calcext:value-type="float">
            <text:p>494210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185783" calcext:value-type="float">
            <text:p>185783</text:p>
          </table:table-cell>
          <table:table-cell office:value-type="float" office:value="498812" calcext:value-type="float">
            <text:p>498812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182764" calcext:value-type="float">
            <text:p>182764</text:p>
          </table:table-cell>
          <table:table-cell office:value-type="float" office:value="500068" calcext:value-type="float">
            <text:p>500068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185364" calcext:value-type="float">
            <text:p>185364</text:p>
          </table:table-cell>
          <table:table-cell office:value-type="float" office:value="506466" calcext:value-type="float">
            <text:p>506466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185917" calcext:value-type="float">
            <text:p>185917</text:p>
          </table:table-cell>
          <table:table-cell office:value-type="float" office:value="513990" calcext:value-type="float">
            <text:p>513990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187274" calcext:value-type="float">
            <text:p>187274</text:p>
          </table:table-cell>
          <table:table-cell office:value-type="float" office:value="516578" calcext:value-type="float">
            <text:p>516578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table:style-name="ce4" table:formula="of:=[.B$63]+((ROW([.B63])-ROW([.B$62]))/(ROW([.B$97])-ROW([.B$63]))*([.B$97]-[.B$63]))" office:value-type="float" office:value="188853.294117647" calcext:value-type="float">
            <text:p>188853.294117647</text:p>
          </table:table-cell>
          <table:table-cell table:style-name="ce4" table:formula="of:=[.C$63]+((ROW([.C63])-ROW([.C$62]))/(ROW([.C$97])-ROW([.C$63]))*([.C$97]-[.C$63]))" office:value-type="float" office:value="521598.176470588" calcext:value-type="float">
            <text:p>521598.176470588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table:style-name="ce4" table:formula="of:=[.B$63]+((ROW([.B64])-ROW([.B$62]))/(ROW([.B$97])-ROW([.B$63]))*([.B$97]-[.B$63]))" office:value-type="float" office:value="190432.588235294" calcext:value-type="float">
            <text:p>190432.588235294</text:p>
          </table:table-cell>
          <table:table-cell table:style-name="ce4" table:formula="of:=[.C$63]+((ROW([.C64])-ROW([.C$62]))/(ROW([.C$97])-ROW([.C$63]))*([.C$97]-[.C$63]))" office:value-type="float" office:value="526618.352941177" calcext:value-type="float">
            <text:p>526618.352941177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table:style-name="ce4" table:formula="of:=[.B$63]+((ROW([.B65])-ROW([.B$62]))/(ROW([.B$97])-ROW([.B$63]))*([.B$97]-[.B$63]))" office:value-type="float" office:value="192011.882352941" calcext:value-type="float">
            <text:p>192011.882352941</text:p>
          </table:table-cell>
          <table:table-cell table:style-name="ce4" table:formula="of:=[.C$63]+((ROW([.C65])-ROW([.C$62]))/(ROW([.C$97])-ROW([.C$63]))*([.C$97]-[.C$63]))" office:value-type="float" office:value="531638.529411765" calcext:value-type="float">
            <text:p>531638.529411765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table:style-name="ce4" table:formula="of:=[.B$63]+((ROW([.B66])-ROW([.B$62]))/(ROW([.B$97])-ROW([.B$63]))*([.B$97]-[.B$63]))" office:value-type="float" office:value="193591.176470588" calcext:value-type="float">
            <text:p>193591.176470588</text:p>
          </table:table-cell>
          <table:table-cell table:style-name="ce4" table:formula="of:=[.C$63]+((ROW([.C66])-ROW([.C$62]))/(ROW([.C$97])-ROW([.C$63]))*([.C$97]-[.C$63]))" office:value-type="float" office:value="536658.705882353" calcext:value-type="float">
            <text:p>536658.705882353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table:style-name="ce4" table:formula="of:=[.B$63]+((ROW([.B67])-ROW([.B$62]))/(ROW([.B$97])-ROW([.B$63]))*([.B$97]-[.B$63]))" office:value-type="float" office:value="195170.470588235" calcext:value-type="float">
            <text:p>195170.470588235</text:p>
          </table:table-cell>
          <table:table-cell table:style-name="ce4" table:formula="of:=[.C$63]+((ROW([.C67])-ROW([.C$62]))/(ROW([.C$97])-ROW([.C$63]))*([.C$97]-[.C$63]))" office:value-type="float" office:value="541678.882352941" calcext:value-type="float">
            <text:p>541678.882352941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table:style-name="ce4" table:formula="of:=[.B$63]+((ROW([.B68])-ROW([.B$62]))/(ROW([.B$97])-ROW([.B$63]))*([.B$97]-[.B$63]))" office:value-type="float" office:value="196749.764705882" calcext:value-type="float">
            <text:p>196749.764705882</text:p>
          </table:table-cell>
          <table:table-cell table:style-name="ce4" table:formula="of:=[.C$63]+((ROW([.C68])-ROW([.C$62]))/(ROW([.C$97])-ROW([.C$63]))*([.C$97]-[.C$63]))" office:value-type="float" office:value="546699.058823529" calcext:value-type="float">
            <text:p>546699.058823529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table:style-name="ce4" table:formula="of:=[.B$63]+((ROW([.B69])-ROW([.B$62]))/(ROW([.B$97])-ROW([.B$63]))*([.B$97]-[.B$63]))" office:value-type="float" office:value="198329.058823529" calcext:value-type="float">
            <text:p>198329.058823529</text:p>
          </table:table-cell>
          <table:table-cell table:style-name="ce4" table:formula="of:=[.C$63]+((ROW([.C69])-ROW([.C$62]))/(ROW([.C$97])-ROW([.C$63]))*([.C$97]-[.C$63]))" office:value-type="float" office:value="551719.235294118" calcext:value-type="float">
            <text:p>551719.235294118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table:style-name="ce4" table:formula="of:=[.B$63]+((ROW([.B70])-ROW([.B$62]))/(ROW([.B$97])-ROW([.B$63]))*([.B$97]-[.B$63]))" office:value-type="float" office:value="199908.352941176" calcext:value-type="float">
            <text:p>199908.352941176</text:p>
          </table:table-cell>
          <table:table-cell table:style-name="ce4" table:formula="of:=[.C$63]+((ROW([.C70])-ROW([.C$62]))/(ROW([.C$97])-ROW([.C$63]))*([.C$97]-[.C$63]))" office:value-type="float" office:value="556739.411764706" calcext:value-type="float">
            <text:p>556739.411764706</text:p>
          </table:table-cell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table:style-name="ce4" table:formula="of:=[.B$63]+((ROW([.B71])-ROW([.B$62]))/(ROW([.B$97])-ROW([.B$63]))*([.B$97]-[.B$63]))" office:value-type="float" office:value="201487.647058824" calcext:value-type="float">
            <text:p>201487.647058824</text:p>
          </table:table-cell>
          <table:table-cell table:style-name="ce4" table:formula="of:=[.C$63]+((ROW([.C71])-ROW([.C$62]))/(ROW([.C$97])-ROW([.C$63]))*([.C$97]-[.C$63]))" office:value-type="float" office:value="561759.588235294" calcext:value-type="float">
            <text:p>561759.588235294</text:p>
          </table:table-cell>
        </table:table-row>
        <table:table-row table:style-name="ro1">
          <table:table-cell office:value-type="date" office:date-value="2017-05-01" calcext:value-type="date">
            <text:p>2017-05-01</text:p>
          </table:table-cell>
          <table:table-cell table:style-name="ce4" table:formula="of:=[.B$63]+((ROW([.B72])-ROW([.B$62]))/(ROW([.B$97])-ROW([.B$63]))*([.B$97]-[.B$63]))" office:value-type="float" office:value="203066.941176471" calcext:value-type="float">
            <text:p>203066.941176471</text:p>
          </table:table-cell>
          <table:table-cell table:style-name="ce4" table:formula="of:=[.C$63]+((ROW([.C72])-ROW([.C$62]))/(ROW([.C$97])-ROW([.C$63]))*([.C$97]-[.C$63]))" office:value-type="float" office:value="566779.764705882" calcext:value-type="float">
            <text:p>566779.764705882</text:p>
          </table:table-cell>
        </table:table-row>
        <table:table-row table:style-name="ro1">
          <table:table-cell office:value-type="date" office:date-value="2017-06-01" calcext:value-type="date">
            <text:p>2017-06-01</text:p>
          </table:table-cell>
          <table:table-cell table:style-name="ce4" table:formula="of:=[.B$63]+((ROW([.B73])-ROW([.B$62]))/(ROW([.B$97])-ROW([.B$63]))*([.B$97]-[.B$63]))" office:value-type="float" office:value="204646.235294118" calcext:value-type="float">
            <text:p>204646.235294118</text:p>
          </table:table-cell>
          <table:table-cell table:style-name="ce4" table:formula="of:=[.C$63]+((ROW([.C73])-ROW([.C$62]))/(ROW([.C$97])-ROW([.C$63]))*([.C$97]-[.C$63]))" office:value-type="float" office:value="571799.941176471" calcext:value-type="float">
            <text:p>571799.941176471</text:p>
          </table:table-cell>
        </table:table-row>
        <table:table-row table:style-name="ro1">
          <table:table-cell office:value-type="date" office:date-value="2017-07-01" calcext:value-type="date">
            <text:p>2017-07-01</text:p>
          </table:table-cell>
          <table:table-cell table:style-name="ce4" table:formula="of:=[.B$63]+((ROW([.B74])-ROW([.B$62]))/(ROW([.B$97])-ROW([.B$63]))*([.B$97]-[.B$63]))" office:value-type="float" office:value="206225.529411765" calcext:value-type="float">
            <text:p>206225.529411765</text:p>
          </table:table-cell>
          <table:table-cell table:style-name="ce4" table:formula="of:=[.C$63]+((ROW([.C74])-ROW([.C$62]))/(ROW([.C$97])-ROW([.C$63]))*([.C$97]-[.C$63]))" office:value-type="float" office:value="576820.117647059" calcext:value-type="float">
            <text:p>576820.117647059</text:p>
          </table:table-cell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table:style-name="ce4" table:formula="of:=[.B$63]+((ROW([.B75])-ROW([.B$62]))/(ROW([.B$97])-ROW([.B$63]))*([.B$97]-[.B$63]))" office:value-type="float" office:value="207804.823529412" calcext:value-type="float">
            <text:p>207804.823529412</text:p>
          </table:table-cell>
          <table:table-cell table:style-name="ce4" table:formula="of:=[.C$63]+((ROW([.C75])-ROW([.C$62]))/(ROW([.C$97])-ROW([.C$63]))*([.C$97]-[.C$63]))" office:value-type="float" office:value="581840.294117647" calcext:value-type="float">
            <text:p>581840.294117647</text:p>
          </table:table-cell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table:style-name="ce4" table:formula="of:=[.B$63]+((ROW([.B76])-ROW([.B$62]))/(ROW([.B$97])-ROW([.B$63]))*([.B$97]-[.B$63]))" office:value-type="float" office:value="209384.117647059" calcext:value-type="float">
            <text:p>209384.117647059</text:p>
          </table:table-cell>
          <table:table-cell table:style-name="ce4" table:formula="of:=[.C$63]+((ROW([.C76])-ROW([.C$62]))/(ROW([.C$97])-ROW([.C$63]))*([.C$97]-[.C$63]))" office:value-type="float" office:value="586860.470588235" calcext:value-type="float">
            <text:p>586860.470588235</text:p>
          </table:table-cell>
        </table:table-row>
        <table:table-row table:style-name="ro1">
          <table:table-cell office:value-type="date" office:date-value="2017-10-01" calcext:value-type="date">
            <text:p>2017-10-01</text:p>
          </table:table-cell>
          <table:table-cell table:style-name="ce4" table:formula="of:=[.B$63]+((ROW([.B77])-ROW([.B$62]))/(ROW([.B$97])-ROW([.B$63]))*([.B$97]-[.B$63]))" office:value-type="float" office:value="210963.411764706" calcext:value-type="float">
            <text:p>210963.411764706</text:p>
          </table:table-cell>
          <table:table-cell table:style-name="ce4" table:formula="of:=[.C$63]+((ROW([.C77])-ROW([.C$62]))/(ROW([.C$97])-ROW([.C$63]))*([.C$97]-[.C$63]))" office:value-type="float" office:value="591880.647058824" calcext:value-type="float">
            <text:p>591880.647058824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table:style-name="ce4" table:formula="of:=[.B$63]+((ROW([.B78])-ROW([.B$62]))/(ROW([.B$97])-ROW([.B$63]))*([.B$97]-[.B$63]))" office:value-type="float" office:value="212542.705882353" calcext:value-type="float">
            <text:p>212542.705882353</text:p>
          </table:table-cell>
          <table:table-cell table:style-name="ce4" table:formula="of:=[.C$63]+((ROW([.C78])-ROW([.C$62]))/(ROW([.C$97])-ROW([.C$63]))*([.C$97]-[.C$63]))" office:value-type="float" office:value="596900.823529412" calcext:value-type="float">
            <text:p>596900.823529412</text:p>
          </table:table-cell>
        </table:table-row>
        <table:table-row table:style-name="ro1">
          <table:table-cell office:value-type="date" office:date-value="2017-12-01" calcext:value-type="date">
            <text:p>2017-12-01</text:p>
          </table:table-cell>
          <table:table-cell table:style-name="ce4" table:formula="of:=[.B$63]+((ROW([.B79])-ROW([.B$62]))/(ROW([.B$97])-ROW([.B$63]))*([.B$97]-[.B$63]))" office:value-type="float" office:value="214122" calcext:value-type="float">
            <text:p>214122</text:p>
          </table:table-cell>
          <table:table-cell table:style-name="ce4" table:formula="of:=[.C$63]+((ROW([.C79])-ROW([.C$62]))/(ROW([.C$97])-ROW([.C$63]))*([.C$97]-[.C$63]))" office:value-type="float" office:value="601921" calcext:value-type="float">
            <text:p>601921</text:p>
          </table:table-cell>
        </table:table-row>
        <table:table-row table:style-name="ro1">
          <table:table-cell office:value-type="date" office:date-value="2018-01-01" calcext:value-type="date">
            <text:p>2018-01-01</text:p>
          </table:table-cell>
          <table:table-cell table:style-name="ce4" table:formula="of:=[.B$63]+((ROW([.B80])-ROW([.B$62]))/(ROW([.B$97])-ROW([.B$63]))*([.B$97]-[.B$63]))" office:value-type="float" office:value="215701.294117647" calcext:value-type="float">
            <text:p>215701.294117647</text:p>
          </table:table-cell>
          <table:table-cell table:style-name="ce4" table:formula="of:=[.C$63]+((ROW([.C80])-ROW([.C$62]))/(ROW([.C$97])-ROW([.C$63]))*([.C$97]-[.C$63]))" office:value-type="float" office:value="606941.176470588" calcext:value-type="float">
            <text:p>606941.176470588</text:p>
          </table:table-cell>
        </table:table-row>
        <table:table-row table:style-name="ro1">
          <table:table-cell office:value-type="date" office:date-value="2018-02-01" calcext:value-type="date">
            <text:p>2018-02-01</text:p>
          </table:table-cell>
          <table:table-cell table:style-name="ce4" table:formula="of:=[.B$63]+((ROW([.B81])-ROW([.B$62]))/(ROW([.B$97])-ROW([.B$63]))*([.B$97]-[.B$63]))" office:value-type="float" office:value="217280.588235294" calcext:value-type="float">
            <text:p>217280.588235294</text:p>
          </table:table-cell>
          <table:table-cell table:style-name="ce4" table:formula="of:=[.C$63]+((ROW([.C81])-ROW([.C$62]))/(ROW([.C$97])-ROW([.C$63]))*([.C$97]-[.C$63]))" office:value-type="float" office:value="611961.352941177" calcext:value-type="float">
            <text:p>611961.352941177</text:p>
          </table:table-cell>
        </table:table-row>
        <table:table-row table:style-name="ro1">
          <table:table-cell office:value-type="date" office:date-value="2018-03-01" calcext:value-type="date">
            <text:p>2018-03-01</text:p>
          </table:table-cell>
          <table:table-cell table:style-name="ce4" table:formula="of:=[.B$63]+((ROW([.B82])-ROW([.B$62]))/(ROW([.B$97])-ROW([.B$63]))*([.B$97]-[.B$63]))" office:value-type="float" office:value="218859.882352941" calcext:value-type="float">
            <text:p>218859.882352941</text:p>
          </table:table-cell>
          <table:table-cell table:style-name="ce4" table:formula="of:=[.C$63]+((ROW([.C82])-ROW([.C$62]))/(ROW([.C$97])-ROW([.C$63]))*([.C$97]-[.C$63]))" office:value-type="float" office:value="616981.529411765" calcext:value-type="float">
            <text:p>616981.529411765</text:p>
          </table:table-cell>
        </table:table-row>
        <table:table-row table:style-name="ro1">
          <table:table-cell office:value-type="date" office:date-value="2018-04-01" calcext:value-type="date">
            <text:p>2018-04-01</text:p>
          </table:table-cell>
          <table:table-cell table:style-name="ce4" table:formula="of:=[.B$63]+((ROW([.B83])-ROW([.B$62]))/(ROW([.B$97])-ROW([.B$63]))*([.B$97]-[.B$63]))" office:value-type="float" office:value="220439.176470588" calcext:value-type="float">
            <text:p>220439.176470588</text:p>
          </table:table-cell>
          <table:table-cell table:style-name="ce4" table:formula="of:=[.C$63]+((ROW([.C83])-ROW([.C$62]))/(ROW([.C$97])-ROW([.C$63]))*([.C$97]-[.C$63]))" office:value-type="float" office:value="622001.705882353" calcext:value-type="float">
            <text:p>622001.705882353</text:p>
          </table:table-cell>
        </table:table-row>
        <table:table-row table:style-name="ro1">
          <table:table-cell office:value-type="date" office:date-value="2018-05-01" calcext:value-type="date">
            <text:p>2018-05-01</text:p>
          </table:table-cell>
          <table:table-cell table:style-name="ce4" table:formula="of:=[.B$63]+((ROW([.B84])-ROW([.B$62]))/(ROW([.B$97])-ROW([.B$63]))*([.B$97]-[.B$63]))" office:value-type="float" office:value="222018.470588235" calcext:value-type="float">
            <text:p>222018.470588235</text:p>
          </table:table-cell>
          <table:table-cell table:style-name="ce4" table:formula="of:=[.C$63]+((ROW([.C84])-ROW([.C$62]))/(ROW([.C$97])-ROW([.C$63]))*([.C$97]-[.C$63]))" office:value-type="float" office:value="627021.882352941" calcext:value-type="float">
            <text:p>627021.882352941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table:style-name="ce4" table:formula="of:=[.B$63]+((ROW([.B85])-ROW([.B$62]))/(ROW([.B$97])-ROW([.B$63]))*([.B$97]-[.B$63]))" office:value-type="float" office:value="223597.764705882" calcext:value-type="float">
            <text:p>223597.764705882</text:p>
          </table:table-cell>
          <table:table-cell table:style-name="ce4" table:formula="of:=[.C$63]+((ROW([.C85])-ROW([.C$62]))/(ROW([.C$97])-ROW([.C$63]))*([.C$97]-[.C$63]))" office:value-type="float" office:value="632042.058823529" calcext:value-type="float">
            <text:p>632042.058823529</text:p>
          </table:table-cell>
        </table:table-row>
        <table:table-row table:style-name="ro1">
          <table:table-cell office:value-type="date" office:date-value="2018-07-01" calcext:value-type="date">
            <text:p>2018-07-01</text:p>
          </table:table-cell>
          <table:table-cell table:style-name="ce4" table:formula="of:=[.B$63]+((ROW([.B86])-ROW([.B$62]))/(ROW([.B$97])-ROW([.B$63]))*([.B$97]-[.B$63]))" office:value-type="float" office:value="225177.058823529" calcext:value-type="float">
            <text:p>225177.058823529</text:p>
          </table:table-cell>
          <table:table-cell table:style-name="ce4" table:formula="of:=[.C$63]+((ROW([.C86])-ROW([.C$62]))/(ROW([.C$97])-ROW([.C$63]))*([.C$97]-[.C$63]))" office:value-type="float" office:value="637062.235294118" calcext:value-type="float">
            <text:p>637062.235294118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table:style-name="ce4" table:formula="of:=[.B$63]+((ROW([.B87])-ROW([.B$62]))/(ROW([.B$97])-ROW([.B$63]))*([.B$97]-[.B$63]))" office:value-type="float" office:value="226756.352941176" calcext:value-type="float">
            <text:p>226756.352941176</text:p>
          </table:table-cell>
          <table:table-cell table:style-name="ce4" table:formula="of:=[.C$63]+((ROW([.C87])-ROW([.C$62]))/(ROW([.C$97])-ROW([.C$63]))*([.C$97]-[.C$63]))" office:value-type="float" office:value="642082.411764706" calcext:value-type="float">
            <text:p>642082.411764706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table:style-name="ce4" table:formula="of:=[.B$63]+((ROW([.B88])-ROW([.B$62]))/(ROW([.B$97])-ROW([.B$63]))*([.B$97]-[.B$63]))" office:value-type="float" office:value="228335.647058824" calcext:value-type="float">
            <text:p>228335.647058824</text:p>
          </table:table-cell>
          <table:table-cell table:style-name="ce4" table:formula="of:=[.C$63]+((ROW([.C88])-ROW([.C$62]))/(ROW([.C$97])-ROW([.C$63]))*([.C$97]-[.C$63]))" office:value-type="float" office:value="647102.588235294" calcext:value-type="float">
            <text:p>647102.588235294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table:style-name="ce4" table:formula="of:=[.B$63]+((ROW([.B89])-ROW([.B$62]))/(ROW([.B$97])-ROW([.B$63]))*([.B$97]-[.B$63]))" office:value-type="float" office:value="229914.941176471" calcext:value-type="float">
            <text:p>229914.941176471</text:p>
          </table:table-cell>
          <table:table-cell table:style-name="ce4" table:formula="of:=[.C$63]+((ROW([.C89])-ROW([.C$62]))/(ROW([.C$97])-ROW([.C$63]))*([.C$97]-[.C$63]))" office:value-type="float" office:value="652122.764705882" calcext:value-type="float">
            <text:p>652122.764705882</text:p>
          </table:table-cell>
        </table:table-row>
        <table:table-row table:style-name="ro1">
          <table:table-cell office:value-type="date" office:date-value="2018-11-01" calcext:value-type="date">
            <text:p>2018-11-01</text:p>
          </table:table-cell>
          <table:table-cell table:style-name="ce4" table:formula="of:=[.B$63]+((ROW([.B90])-ROW([.B$62]))/(ROW([.B$97])-ROW([.B$63]))*([.B$97]-[.B$63]))" office:value-type="float" office:value="231494.235294118" calcext:value-type="float">
            <text:p>231494.235294118</text:p>
          </table:table-cell>
          <table:table-cell table:style-name="ce4" table:formula="of:=[.C$63]+((ROW([.C90])-ROW([.C$62]))/(ROW([.C$97])-ROW([.C$63]))*([.C$97]-[.C$63]))" office:value-type="float" office:value="657142.941176471" calcext:value-type="float">
            <text:p>657142.941176471</text:p>
          </table:table-cell>
        </table:table-row>
        <table:table-row table:style-name="ro1">
          <table:table-cell office:value-type="date" office:date-value="2018-12-01" calcext:value-type="date">
            <text:p>2018-12-01</text:p>
          </table:table-cell>
          <table:table-cell table:style-name="ce4" table:formula="of:=[.B$63]+((ROW([.B91])-ROW([.B$62]))/(ROW([.B$97])-ROW([.B$63]))*([.B$97]-[.B$63]))" office:value-type="float" office:value="233073.529411765" calcext:value-type="float">
            <text:p>233073.529411765</text:p>
          </table:table-cell>
          <table:table-cell table:style-name="ce4" table:formula="of:=[.C$63]+((ROW([.C91])-ROW([.C$62]))/(ROW([.C$97])-ROW([.C$63]))*([.C$97]-[.C$63]))" office:value-type="float" office:value="662163.117647059" calcext:value-type="float">
            <text:p>662163.117647059</text:p>
          </table:table-cell>
        </table:table-row>
        <table:table-row table:style-name="ro1">
          <table:table-cell office:value-type="date" office:date-value="2019-01-01" calcext:value-type="date">
            <text:p>2019-01-01</text:p>
          </table:table-cell>
          <table:table-cell table:style-name="ce4" table:formula="of:=[.B$63]+((ROW([.B92])-ROW([.B$62]))/(ROW([.B$97])-ROW([.B$63]))*([.B$97]-[.B$63]))" office:value-type="float" office:value="234652.823529412" calcext:value-type="float">
            <text:p>234652.823529412</text:p>
          </table:table-cell>
          <table:table-cell table:style-name="ce4" table:formula="of:=[.C$63]+((ROW([.C92])-ROW([.C$62]))/(ROW([.C$97])-ROW([.C$63]))*([.C$97]-[.C$63]))" office:value-type="float" office:value="667183.294117647" calcext:value-type="float">
            <text:p>667183.294117647</text:p>
          </table:table-cell>
        </table:table-row>
        <table:table-row table:style-name="ro1">
          <table:table-cell office:value-type="date" office:date-value="2019-02-01" calcext:value-type="date">
            <text:p>2019-02-01</text:p>
          </table:table-cell>
          <table:table-cell table:style-name="ce4" table:formula="of:=[.B$63]+((ROW([.B93])-ROW([.B$62]))/(ROW([.B$97])-ROW([.B$63]))*([.B$97]-[.B$63]))" office:value-type="float" office:value="236232.117647059" calcext:value-type="float">
            <text:p>236232.117647059</text:p>
          </table:table-cell>
          <table:table-cell table:style-name="ce4" table:formula="of:=[.C$63]+((ROW([.C93])-ROW([.C$62]))/(ROW([.C$97])-ROW([.C$63]))*([.C$97]-[.C$63]))" office:value-type="float" office:value="672203.470588235" calcext:value-type="float">
            <text:p>672203.470588235</text:p>
          </table:table-cell>
        </table:table-row>
        <table:table-row table:style-name="ro1">
          <table:table-cell office:value-type="date" office:date-value="2019-03-01" calcext:value-type="date">
            <text:p>2019-03-01</text:p>
          </table:table-cell>
          <table:table-cell table:style-name="ce4" table:formula="of:=[.B$63]+((ROW([.B94])-ROW([.B$62]))/(ROW([.B$97])-ROW([.B$63]))*([.B$97]-[.B$63]))" office:value-type="float" office:value="237811.411764706" calcext:value-type="float">
            <text:p>237811.411764706</text:p>
          </table:table-cell>
          <table:table-cell table:style-name="ce4" table:formula="of:=[.C$63]+((ROW([.C94])-ROW([.C$62]))/(ROW([.C$97])-ROW([.C$63]))*([.C$97]-[.C$63]))" office:value-type="float" office:value="677223.647058824" calcext:value-type="float">
            <text:p>677223.647058824</text:p>
          </table:table-cell>
        </table:table-row>
        <table:table-row table:style-name="ro1">
          <table:table-cell office:value-type="date" office:date-value="2019-04-01" calcext:value-type="date">
            <text:p>2019-04-01</text:p>
          </table:table-cell>
          <table:table-cell table:style-name="ce4" table:formula="of:=[.B$63]+((ROW([.B95])-ROW([.B$62]))/(ROW([.B$97])-ROW([.B$63]))*([.B$97]-[.B$63]))" office:value-type="float" office:value="239390.705882353" calcext:value-type="float">
            <text:p>239390.705882353</text:p>
          </table:table-cell>
          <table:table-cell table:style-name="ce4" table:formula="of:=[.C$63]+((ROW([.C95])-ROW([.C$62]))/(ROW([.C$97])-ROW([.C$63]))*([.C$97]-[.C$63]))" office:value-type="float" office:value="682243.823529412" calcext:value-type="float">
            <text:p>682243.823529412</text:p>
          </table:table-cell>
        </table:table-row>
        <table:table-row table:style-name="ro1">
          <table:table-cell office:value-type="date" office:date-value="2019-05-01" calcext:value-type="date">
            <text:p>2019-05-01</text:p>
          </table:table-cell>
          <table:table-cell office:value-type="float" office:value="240970" calcext:value-type="float">
            <text:p>240970</text:p>
          </table:table-cell>
          <table:table-cell office:value-type="float" office:value="687264" calcext:value-type="float">
            <text:p>687264</text:p>
          </table:table-cell>
        </table:table-row>
        <table:table-row table:style-name="ro1">
          <table:table-cell office:value-type="date" office:date-value="2019-06-01" calcext:value-type="date">
            <text:p>2019-06-01</text:p>
          </table:table-cell>
          <table:table-cell office:value-type="float" office:value="246678" calcext:value-type="float">
            <text:p>246678</text:p>
          </table:table-cell>
          <table:table-cell office:value-type="float" office:value="720361" calcext:value-type="float">
            <text:p>720361</text:p>
          </table:table-cell>
        </table:table-row>
        <table:table-row table:style-name="ro1">
          <table:table-cell office:value-type="date" office:date-value="2019-07-01" calcext:value-type="date">
            <text:p>2019-07-01</text:p>
          </table:table-cell>
          <table:table-cell office:value-type="float" office:value="246688" calcext:value-type="float">
            <text:p>246688</text:p>
          </table:table-cell>
          <table:table-cell office:value-type="float" office:value="721253" calcext:value-type="float">
            <text:p>721253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46974" calcext:value-type="float">
            <text:p>246974</text:p>
          </table:table-cell>
          <table:table-cell office:value-type="float" office:value="748166" calcext:value-type="float">
            <text:p>748166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47059" calcext:value-type="float">
            <text:p>247059</text:p>
          </table:table-cell>
          <table:table-cell office:value-type="float" office:value="749556" calcext:value-type="float">
            <text:p>749556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float" office:value="249176" calcext:value-type="float">
            <text:p>249176</text:p>
          </table:table-cell>
          <table:table-cell office:value-type="float" office:value="755025" calcext:value-type="float">
            <text:p>755025</text:p>
          </table:table-cell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office:value-type="float" office:value="250568" calcext:value-type="float">
            <text:p>250568</text:p>
          </table:table-cell>
          <table:table-cell office:value-type="float" office:value="758935" calcext:value-type="float">
            <text:p>758935</text:p>
          </table:table-cell>
        </table:table-row>
        <table:table-row table:style-name="ro1">
          <table:table-cell office:value-type="date" office:date-value="2019-12-01" calcext:value-type="date">
            <text:p>2019-12-01</text:p>
          </table:table-cell>
          <table:table-cell office:value-type="float" office:value="250690" calcext:value-type="float">
            <text:p>250690</text:p>
          </table:table-cell>
          <table:table-cell office:value-type="float" office:value="762101" calcext:value-type="float">
            <text:p>762101</text:p>
          </table:table-cell>
        </table:table-row>
        <table:table-row table:style-name="ro1">
          <table:table-cell office:value-type="date" office:date-value="2020-01-01" calcext:value-type="date">
            <text:p>2020-01-01</text:p>
          </table:table-cell>
          <table:table-cell office:value-type="float" office:value="250737" calcext:value-type="float">
            <text:p>250737</text:p>
          </table:table-cell>
          <table:table-cell office:value-type="float" office:value="762383" calcext:value-type="float">
            <text:p>762383</text:p>
          </table:table-cell>
        </table:table-row>
        <table:table-row table:style-name="ro1">
          <table:table-cell office:value-type="date" office:date-value="2020-02-01" calcext:value-type="date">
            <text:p>2020-02-01</text:p>
          </table:table-cell>
          <table:table-cell office:value-type="float" office:value="255172" calcext:value-type="float">
            <text:p>255172</text:p>
          </table:table-cell>
          <table:table-cell office:value-type="float" office:value="783816" calcext:value-type="float">
            <text:p>783816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office:value-type="float" office:value="255029" calcext:value-type="float">
            <text:p>255029</text:p>
          </table:table-cell>
          <table:table-cell office:value-type="float" office:value="787059" calcext:value-type="float">
            <text:p>787059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55311" calcext:value-type="float">
            <text:p>255311</text:p>
          </table:table-cell>
          <table:table-cell office:value-type="float" office:value="791313" calcext:value-type="float">
            <text:p>791313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5422" calcext:value-type="float">
            <text:p>255422</text:p>
          </table:table-cell>
          <table:table-cell office:value-type="float" office:value="794010" calcext:value-type="float">
            <text:p>794010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256132" calcext:value-type="float">
            <text:p>256132</text:p>
          </table:table-cell>
          <table:table-cell office:value-type="float" office:value="795470" calcext:value-type="float">
            <text:p>795470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54093" calcext:value-type="float">
            <text:p>254093</text:p>
          </table:table-cell>
          <table:table-cell office:value-type="float" office:value="794594" calcext:value-type="float">
            <text:p>794594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54866" calcext:value-type="float">
            <text:p>254866</text:p>
          </table:table-cell>
          <table:table-cell office:value-type="float" office:value="800002" calcext:value-type="float">
            <text:p>800002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55443" calcext:value-type="float">
            <text:p>255443</text:p>
          </table:table-cell>
          <table:table-cell office:value-type="float" office:value="801001" calcext:value-type="float">
            <text:p>801001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257364" calcext:value-type="float">
            <text:p>257364</text:p>
          </table:table-cell>
          <table:table-cell office:value-type="float" office:value="807817" calcext:value-type="float">
            <text:p>807817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259469" calcext:value-type="float">
            <text:p>259469</text:p>
          </table:table-cell>
          <table:table-cell office:value-type="float" office:value="811611" calcext:value-type="float">
            <text:p>811611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259518" calcext:value-type="float">
            <text:p>259518</text:p>
          </table:table-cell>
          <table:table-cell office:value-type="float" office:value="815857" calcext:value-type="float">
            <text:p>815857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59518" calcext:value-type="float">
            <text:p>259518</text:p>
          </table:table-cell>
          <table:table-cell office:value-type="float" office:value="815857" calcext:value-type="float">
            <text:p>815857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259518" calcext:value-type="float">
            <text:p>259518</text:p>
          </table:table-cell>
          <table:table-cell office:value-type="float" office:value="815857" calcext:value-type="float">
            <text:p>815857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266470" calcext:value-type="float">
            <text:p>266470</text:p>
          </table:table-cell>
          <table:table-cell office:value-type="float" office:value="838895" calcext:value-type="float">
            <text:p>838895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266470" calcext:value-type="float">
            <text:p>266470</text:p>
          </table:table-cell>
          <table:table-cell office:value-type="float" office:value="838895" calcext:value-type="float">
            <text:p>838895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266470" calcext:value-type="float">
            <text:p>266470</text:p>
          </table:table-cell>
          <table:table-cell office:value-type="float" office:value="838895" calcext:value-type="float">
            <text:p>838895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266470" calcext:value-type="float">
            <text:p>266470</text:p>
          </table:table-cell>
          <table:table-cell office:value-type="float" office:value="838895" calcext:value-type="float">
            <text:p>838895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266470" calcext:value-type="float">
            <text:p>266470</text:p>
          </table:table-cell>
          <table:table-cell office:value-type="float" office:value="838895" calcext:value-type="float">
            <text:p>838895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66470" calcext:value-type="float">
            <text:p>266470</text:p>
          </table:table-cell>
          <table:table-cell office:value-type="float" office:value="838895" calcext:value-type="float">
            <text:p>83889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66470" calcext:value-type="float">
            <text:p>266470</text:p>
          </table:table-cell>
          <table:table-cell office:value-type="float" office:value="838895" calcext:value-type="float">
            <text:p>838895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266470" calcext:value-type="float">
            <text:p>266470</text:p>
          </table:table-cell>
          <table:table-cell office:value-type="float" office:value="838895" calcext:value-type="float">
            <text:p>838895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266470" calcext:value-type="float">
            <text:p>266470</text:p>
          </table:table-cell>
          <table:table-cell office:value-type="float" office:value="838895" calcext:value-type="float">
            <text:p>838895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266470" calcext:value-type="float">
            <text:p>266470</text:p>
          </table:table-cell>
          <table:table-cell office:value-type="float" office:value="838895" calcext:value-type="float">
            <text:p>838895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266470" calcext:value-type="float">
            <text:p>266470</text:p>
          </table:table-cell>
          <table:table-cell office:value-type="float" office:value="838895" calcext:value-type="float">
            <text:p>83889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266470" calcext:value-type="float">
            <text:p>266470</text:p>
          </table:table-cell>
          <table:table-cell office:value-type="float" office:value="838895" calcext:value-type="float">
            <text:p>838895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71961" calcext:value-type="float">
            <text:p>271961</text:p>
          </table:table-cell>
          <table:table-cell office:value-type="float" office:value="863738" calcext:value-type="float">
            <text:p>863738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float" office:value="271961" calcext:value-type="float">
            <text:p>271961</text:p>
          </table:table-cell>
          <table:table-cell office:value-type="float" office:value="863738" calcext:value-type="float">
            <text:p>863738</text:p>
          </table:table-cell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float" office:value="271961" calcext:value-type="float">
            <text:p>271961</text:p>
          </table:table-cell>
          <table:table-cell office:value-type="float" office:value="863738" calcext:value-type="float">
            <text:p>863738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271961" calcext:value-type="float">
            <text:p>271961</text:p>
          </table:table-cell>
          <table:table-cell office:value-type="float" office:value="863738" calcext:value-type="float">
            <text:p>863738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271961" calcext:value-type="float">
            <text:p>271961</text:p>
          </table:table-cell>
          <table:table-cell office:value-type="float" office:value="863738" calcext:value-type="float">
            <text:p>863738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71961" calcext:value-type="float">
            <text:p>271961</text:p>
          </table:table-cell>
          <table:table-cell office:value-type="float" office:value="863738" calcext:value-type="float">
            <text:p>863738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71961" calcext:value-type="float">
            <text:p>271961</text:p>
          </table:table-cell>
          <table:table-cell office:value-type="float" office:value="863738" calcext:value-type="float">
            <text:p>863738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float" office:value="271961" calcext:value-type="float">
            <text:p>271961</text:p>
          </table:table-cell>
          <table:table-cell office:value-type="float" office:value="863738" calcext:value-type="float">
            <text:p>863738</text:p>
          </table:table-cell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float" office:value="271961" calcext:value-type="float">
            <text:p>271961</text:p>
          </table:table-cell>
          <table:table-cell office:value-type="float" office:value="863738" calcext:value-type="float">
            <text:p>863738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float" office:value="271961" calcext:value-type="float">
            <text:p>271961</text:p>
          </table:table-cell>
          <table:table-cell office:value-type="float" office:value="863738" calcext:value-type="float">
            <text:p>863738</text:p>
          </table:table-cell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office:value-type="float" office:value="271961" calcext:value-type="float">
            <text:p>271961</text:p>
          </table:table-cell>
          <table:table-cell office:value-type="float" office:value="863738" calcext:value-type="float">
            <text:p>863738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float" office:value="271961" calcext:value-type="float">
            <text:p>271961</text:p>
          </table:table-cell>
          <table:table-cell office:value-type="float" office:value="863738" calcext:value-type="float">
            <text:p>863738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275625" calcext:value-type="float">
            <text:p>275625</text:p>
          </table:table-cell>
          <table:table-cell office:value-type="float" office:value="889043" calcext:value-type="float">
            <text:p>889043</text:p>
          </table:table-cell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office:value-type="float" office:value="275624" calcext:value-type="float">
            <text:p>275624</text:p>
          </table:table-cell>
          <table:table-cell office:value-type="float" office:value="889540" calcext:value-type="float">
            <text:p>889540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float" office:value="275679" calcext:value-type="float">
            <text:p>275679</text:p>
          </table:table-cell>
          <table:table-cell office:value-type="float" office:value="890347" calcext:value-type="float">
            <text:p>890347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float" office:value="275703" calcext:value-type="float">
            <text:p>275703</text:p>
          </table:table-cell>
          <table:table-cell office:value-type="float" office:value="891703" calcext:value-type="float">
            <text:p>891703</text:p>
          </table:table-cell>
        </table:table-row>
        <table:table-row table:style-name="ro1">
          <table:table-cell office:value-type="date" office:date-value="2023-07-01" calcext:value-type="date">
            <text:p>2023-07-01</text:p>
          </table:table-cell>
          <table:table-cell office:value-type="float" office:value="275752" calcext:value-type="float">
            <text:p>275752</text:p>
          </table:table-cell>
          <table:table-cell office:value-type="float" office:value="892641" calcext:value-type="float">
            <text:p>892641</text:p>
          </table:table-cell>
        </table:table-row>
        <table:table-row table:style-name="ro1">
          <table:table-cell office:value-type="date" office:date-value="2023-08-01" calcext:value-type="date">
            <text:p>2023-08-01</text:p>
          </table:table-cell>
          <table:table-cell office:value-type="float" office:value="276026" calcext:value-type="float">
            <text:p>276026</text:p>
          </table:table-cell>
          <table:table-cell office:value-type="float" office:value="894735" calcext:value-type="float">
            <text:p>894735</text:p>
          </table:table-cell>
        </table:table-row>
        <table:table-row table:style-name="ro1">
          <table:table-cell office:value-type="date" office:date-value="2023-09-01" calcext:value-type="date">
            <text:p>2023-09-01</text:p>
          </table:table-cell>
          <table:table-cell office:value-type="float" office:value="276316" calcext:value-type="float">
            <text:p>276316</text:p>
          </table:table-cell>
          <table:table-cell office:value-type="float" office:value="896196" calcext:value-type="float">
            <text:p>896196</text:p>
          </table:table-cell>
        </table:table-row>
        <table:table-row table:style-name="ro1">
          <table:table-cell office:value-type="date" office:date-value="2023-10-01" calcext:value-type="date">
            <text:p>2023-10-01</text:p>
          </table:table-cell>
          <table:table-cell office:value-type="float" office:value="276327" calcext:value-type="float">
            <text:p>276327</text:p>
          </table:table-cell>
          <table:table-cell office:value-type="float" office:value="896209" calcext:value-type="float">
            <text:p>896209</text:p>
          </table:table-cell>
        </table:table-row>
        <table:table-row table:style-name="ro1">
          <table:table-cell office:value-type="date" office:date-value="2023-11-01" calcext:value-type="date">
            <text:p>2023-11-01</text:p>
          </table:table-cell>
          <table:table-cell office:value-type="float" office:value="276377" calcext:value-type="float">
            <text:p>276377</text:p>
          </table:table-cell>
          <table:table-cell office:value-type="float" office:value="896654" calcext:value-type="float">
            <text:p>896654</text:p>
          </table:table-cell>
        </table:table-row>
        <table:table-row table:style-name="ro1">
          <table:table-cell office:value-type="date" office:date-value="2023-12-01" calcext:value-type="date">
            <text:p>2023-12-01</text:p>
          </table:table-cell>
          <table:table-cell office:value-type="float" office:value="276466" calcext:value-type="float">
            <text:p>276466</text:p>
          </table:table-cell>
          <table:table-cell office:value-type="float" office:value="898062" calcext:value-type="float">
            <text:p>898062</text:p>
          </table:table-cell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float" office:value="276647" calcext:value-type="float">
            <text:p>276647</text:p>
          </table:table-cell>
          <table:table-cell office:value-type="float" office:value="898806" calcext:value-type="float">
            <text:p>898806</text:p>
          </table:table-cell>
        </table:table-row>
        <table:table-row table:style-name="ro1">
          <table:table-cell office:value-type="date" office:date-value="2024-02-01" calcext:value-type="date">
            <text:p>2024-02-01</text:p>
          </table:table-cell>
          <table:table-cell office:value-type="float" office:value="277533" calcext:value-type="float">
            <text:p>277533</text:p>
          </table:table-cell>
          <table:table-cell office:value-type="float" office:value="901374" calcext:value-type="float">
            <text:p>901374</text:p>
          </table:table-cell>
        </table:table-row>
        <table:table-row table:style-name="ro1">
          <table:table-cell office:value-type="date" office:date-value="2024-03-01" calcext:value-type="date">
            <text:p>2024-03-01</text:p>
          </table:table-cell>
          <table:table-cell office:value-type="float" office:value="277962" calcext:value-type="float">
            <text:p>277962</text:p>
          </table:table-cell>
          <table:table-cell office:value-type="float" office:value="902994" calcext:value-type="float">
            <text:p>902994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78032" calcext:value-type="float">
            <text:p>278032</text:p>
          </table:table-cell>
          <table:table-cell office:value-type="float" office:value="903327" calcext:value-type="float">
            <text:p>903327</text:p>
          </table:table-cell>
        </table:table-row>
        <table:table-row table:style-name="ro1">
          <table:table-cell office:value-type="date" office:date-value="2024-05-01" calcext:value-type="date">
            <text:p>2024-05-01</text:p>
          </table:table-cell>
          <table:table-cell office:value-type="float" office:value="278037" calcext:value-type="float">
            <text:p>278037</text:p>
          </table:table-cell>
          <table:table-cell office:value-type="float" office:value="903343" calcext:value-type="float">
            <text:p>903343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office:value-type="float" office:value="278049" calcext:value-type="float">
            <text:p>278049</text:p>
          </table:table-cell>
          <table:table-cell office:value-type="float" office:value="903908" calcext:value-type="float">
            <text:p>903908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278078" calcext:value-type="float">
            <text:p>278078</text:p>
          </table:table-cell>
          <table:table-cell office:value-type="float" office:value="904184" calcext:value-type="float">
            <text:p>904184</text:p>
          </table:table-cell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float" office:value="278078" calcext:value-type="float">
            <text:p>278078</text:p>
          </table:table-cell>
          <table:table-cell office:value-type="float" office:value="904278" calcext:value-type="float">
            <text:p>904278</text:p>
          </table:table-cell>
        </table:table-row>
        <table:table-row table:style-name="ro1">
          <table:table-cell office:value-type="date" office:date-value="2024-09-01" calcext:value-type="date">
            <text:p>2024-09-01</text:p>
          </table:table-cell>
          <table:table-cell office:value-type="float" office:value="278490" calcext:value-type="float">
            <text:p>278490</text:p>
          </table:table-cell>
          <table:table-cell office:value-type="float" office:value="906185" calcext:value-type="float">
            <text:p>906185</text:p>
          </table:table-cell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float" office:value="278495" calcext:value-type="float">
            <text:p>278495</text:p>
          </table:table-cell>
          <table:table-cell office:value-type="float" office:value="909807" calcext:value-type="float">
            <text:p>909807</text:p>
          </table:table-cell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float" office:value="278501" calcext:value-type="float">
            <text:p>278501</text:p>
          </table:table-cell>
          <table:table-cell office:value-type="float" office:value="910072" calcext:value-type="float">
            <text:p>910072</text:p>
          </table:table-cell>
        </table:table-row>
        <table:table-row table:style-name="ro1">
          <table:table-cell office:value-type="date" office:date-value="2024-12-01" calcext:value-type="date">
            <text:p>2024-12-01</text:p>
          </table:table-cell>
          <table:table-cell office:value-type="float" office:value="278528" calcext:value-type="float">
            <text:p>278528</text:p>
          </table:table-cell>
          <table:table-cell office:value-type="float" office:value="1013792" calcext:value-type="float">
            <text:p>1013792</text:p>
          </table:table-cell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float" office:value="278730" calcext:value-type="float">
            <text:p>278730</text:p>
          </table:table-cell>
          <table:table-cell office:value-type="float" office:value="1016501" calcext:value-type="float">
            <text:p>1016501</text:p>
          </table:table-cell>
        </table:table-row>
        <table:table-row table:style-name="ro1">
          <table:table-cell office:value-type="date" office:date-value="2025-02-01" calcext:value-type="date">
            <text:p>2025-02-01</text:p>
          </table:table-cell>
          <table:table-cell office:value-type="float" office:value="278950" calcext:value-type="float">
            <text:p>278950</text:p>
          </table:table-cell>
          <table:table-cell office:value-type="float" office:value="1017454" calcext:value-type="float">
            <text:p>1017454</text:p>
          </table:table-cell>
        </table:table-row>
        <table:table-row table:style-name="ro1">
          <table:table-cell office:value-type="date" office:date-value="2025-03-01" calcext:value-type="date">
            <text:p>2025-03-01</text:p>
          </table:table-cell>
          <table:table-cell office:value-type="float" office:value="277631" calcext:value-type="float">
            <text:p>277631</text:p>
          </table:table-cell>
          <table:table-cell office:value-type="float" office:value="1021119" calcext:value-type="float">
            <text:p>1021119</text:p>
          </table:table-cell>
        </table:table-row>
        <table:table-row table:style-name="ro1">
          <table:table-cell office:value-type="date" office:date-value="2025-04-01" calcext:value-type="date">
            <text:p>2025-04-01</text:p>
          </table:table-cell>
          <table:table-cell office:value-type="float" office:value="277794" calcext:value-type="float">
            <text:p>277794</text:p>
          </table:table-cell>
          <table:table-cell office:value-type="float" office:value="1023826" calcext:value-type="float">
            <text:p>1023826</text:p>
          </table:table-cell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float" office:value="277954" calcext:value-type="float">
            <text:p>277954</text:p>
          </table:table-cell>
          <table:table-cell office:value-type="float" office:value="1024469" calcext:value-type="float">
            <text:p>1024469</text:p>
          </table:table-cell>
        </table:table-row>
        <table:table-row table:style-name="ro1">
          <table:table-cell office:value-type="date" office:date-value="2025-06-01" calcext:value-type="date">
            <text:p>2025-06-01</text:p>
          </table:table-cell>
          <table:table-cell office:value-type="float" office:value="277960" calcext:value-type="float">
            <text:p>277960</text:p>
          </table:table-cell>
          <table:table-cell office:value-type="float" office:value="1024688" calcext:value-type="float">
            <text:p>1024688</text:p>
          </table:table-cell>
        </table:table-row>
        <table:table-row table:style-name="ro1">
          <table:table-cell office:value-type="date" office:date-value="2025-07-01" calcext:value-type="date">
            <text:p>2025-07-01</text:p>
          </table:table-cell>
          <table:table-cell office:value-type="float" office:value="278694" calcext:value-type="float">
            <text:p>278694</text:p>
          </table:table-cell>
          <table:table-cell office:value-type="float" office:value="1026434" calcext:value-type="float">
            <text:p>1026434</text:p>
          </table:table-cell>
        </table:table-row>
        <table:table-row table:style-name="ro1">
          <table:table-cell office:value-type="date" office:date-value="2025-08-01" calcext:value-type="date">
            <text:p>2025-08-01</text:p>
          </table:table-cell>
          <table:table-cell office:value-type="float" office:value="278707" calcext:value-type="float">
            <text:p>278707</text:p>
          </table:table-cell>
          <table:table-cell office:value-type="float" office:value="1026378" calcext:value-type="float">
            <text:p>1026378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278951" calcext:value-type="float">
            <text:p>278951</text:p>
          </table:table-cell>
          <table:table-cell office:value-type="float" office:value="1026795" calcext:value-type="float">
            <text:p>102679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float" office:value="278961" calcext:value-type="float">
            <text:p>278961</text:p>
          </table:table-cell>
          <table:table-cell office:value-type="float" office:value="1026848" calcext:value-type="float">
            <text:p>1026848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float" office:value="279213" calcext:value-type="float">
            <text:p>279213</text:p>
          </table:table-cell>
          <table:table-cell office:value-type="float" office:value="1027268" calcext:value-type="float">
            <text:p>1027268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float" office:value="279653" calcext:value-type="float">
            <text:p>279653</text:p>
          </table:table-cell>
          <table:table-cell office:value-type="float" office:value="1030404" calcext:value-type="float">
            <text:p>1030404</text:p>
          </table:table-cell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float" office:value="279994" calcext:value-type="float">
            <text:p>279994</text:p>
          </table:table-cell>
          <table:table-cell office:value-type="float" office:value="1032024" calcext:value-type="float">
            <text:p>1032024</text:p>
          </table:table-cell>
        </table:table-row>
        <table:table-row table:style-name="ro1">
          <table:table-cell office:value-type="date" office:date-value="2026-02-01" calcext:value-type="date">
            <text:p>2026-02-01</text:p>
          </table:table-cell>
          <table:table-cell office:value-type="float" office:value="279991" calcext:value-type="float">
            <text:p>279991</text:p>
          </table:table-cell>
          <table:table-cell office:value-type="float" office:value="1032396" calcext:value-type="float">
            <text:p>1032396</text:p>
          </table:table-cell>
        </table:table-row>
        <table:table-row table:style-name="ro1">
          <table:table-cell office:value-type="date" office:date-value="2026-03-01" calcext:value-type="date">
            <text:p>2026-03-01</text:p>
          </table:table-cell>
          <table:table-cell office:value-type="float" office:value="280013" calcext:value-type="float">
            <text:p>280013</text:p>
          </table:table-cell>
          <table:table-cell office:value-type="float" office:value="1035501" calcext:value-type="float">
            <text:p>1035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4:46:51.215674473</meta:creation-date>
    <dc:date>2026-03-10T15:21:35.138031336</dc:date>
    <meta:editing-duration>PT7M59S</meta:editing-duration>
    <meta:editing-cycles>1</meta:editing-cycles>
    <meta:document-statistic meta:table-count="1" meta:cell-count="537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08cm" svg:height="19.92cm" xlink:href=".." xlink:type="simple" chart:class="chart:line" chart:style-name="ch1">
        <chart:legend chart:legend-position="end" svg:x="32.87cm" svg:y="9.412cm" style:legend-expansion="high" chart:style-name="ch2"/>
        <chart:plot-area chart:style-name="ch3" table:cell-range-address="Sheet1.A1:Sheet1.C179" chart:data-source-has-labels="both" svg:x="0.7cm" svg:y="0.398cm" svg:width="31.47cm" svg:height="19.124cm">
          <chart:coordinate-region svg:x="2.275cm" svg:y="0.597cm" svg:width="29.895cm" svg:height="17.16cm"/>
          <chart:axis chart:dimension="x" chart:name="primary-x" chart:style-name="ch4" chartooo:axis-type="auto">
            <chartooo:date-scale/>
            <chart:categories table:cell-range-address="Sheet1.A2:Sheet1.A1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79" chart:label-cell-address="Sheet1.B1:Sheet1.B1" chart:class="chart:line">
            <chart:data-point chart:repeated="178"/>
          </chart:series>
          <chart:series chart:style-name="ch8" chart:values-cell-range-address="Sheet1.C2:Sheet1.C179" chart:label-cell-address="Sheet1.C1:Sheet1.C1" chart:class="chart:line">
            <chart:data-point chart:repeated="61"/>
            <chart:data-point chart:style-name="ch9"/>
            <chart:data-point chart:repeated="1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T</text:p>
                <draw:g>
                  <svg:desc>Sheet1.B1:Sheet1.B1</svg:desc>
                </draw:g>
              </table:table-cell>
              <table:table-cell office:value-type="string">
                <text:p>Al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0695">
                <text:p>40695</text:p>
                <draw:g>
                  <svg:desc>Sheet1.A2:Sheet1.A179</svg:desc>
                </draw:g>
              </table:table-cell>
              <table:table-cell office:value-type="float" office:value="0">
                <text:p>0</text:p>
                <draw:g>
                  <svg:desc>Sheet1.B2:Sheet1.B179</svg:desc>
                </draw:g>
              </table:table-cell>
              <table:table-cell office:value-type="float" office:value="8507">
                <text:p>8507</text:p>
                <draw:g>
                  <svg:desc>Sheet1.C2:Sheet1.C179</svg:desc>
                </draw:g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0">
                <text:p>0</text:p>
              </table:table-cell>
              <table:table-cell office:value-type="float" office:value="16084">
                <text:p>16084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0">
                <text:p>0</text:p>
              </table:table-cell>
              <table:table-cell office:value-type="float" office:value="16084">
                <text:p>16084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0">
                <text:p>0</text:p>
              </table:table-cell>
              <table:table-cell office:value-type="float" office:value="16084">
                <text:p>16084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9294">
                <text:p>9294</text:p>
              </table:table-cell>
              <table:table-cell office:value-type="float" office:value="34247">
                <text:p>34247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9429">
                <text:p>9429</text:p>
              </table:table-cell>
              <table:table-cell office:value-type="float" office:value="34993">
                <text:p>3499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4027">
                <text:p>14027</text:p>
              </table:table-cell>
              <table:table-cell office:value-type="float" office:value="50036">
                <text:p>50036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6345">
                <text:p>16345</text:p>
              </table:table-cell>
              <table:table-cell office:value-type="float" office:value="55279">
                <text:p>55279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24271">
                <text:p>24271</text:p>
              </table:table-cell>
              <table:table-cell office:value-type="float" office:value="66402">
                <text:p>66402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43160">
                <text:p>43160</text:p>
              </table:table-cell>
              <table:table-cell office:value-type="float" office:value="70923">
                <text:p>7092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7125">
                <text:p>47125</text:p>
              </table:table-cell>
              <table:table-cell office:value-type="float" office:value="78565">
                <text:p>7856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47810">
                <text:p>47810</text:p>
              </table:table-cell>
              <table:table-cell office:value-type="float" office:value="82462">
                <text:p>82462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50445">
                <text:p>50445</text:p>
              </table:table-cell>
              <table:table-cell office:value-type="float" office:value="89357">
                <text:p>89357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53952">
                <text:p>53952</text:p>
              </table:table-cell>
              <table:table-cell office:value-type="float" office:value="99385">
                <text:p>99385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57635">
                <text:p>57635</text:p>
              </table:table-cell>
              <table:table-cell office:value-type="float" office:value="106306">
                <text:p>106306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59414">
                <text:p>59414</text:p>
              </table:table-cell>
              <table:table-cell office:value-type="float" office:value="109914">
                <text:p>109914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61366">
                <text:p>61366</text:p>
              </table:table-cell>
              <table:table-cell office:value-type="float" office:value="114369">
                <text:p>114369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1858">
                <text:p>61858</text:p>
              </table:table-cell>
              <table:table-cell office:value-type="float" office:value="115207">
                <text:p>11520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61858">
                <text:p>61858</text:p>
              </table:table-cell>
              <table:table-cell office:value-type="float" office:value="115207">
                <text:p>115207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65312">
                <text:p>65312</text:p>
              </table:table-cell>
              <table:table-cell office:value-type="float" office:value="127342">
                <text:p>127342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70237">
                <text:p>70237</text:p>
              </table:table-cell>
              <table:table-cell office:value-type="float" office:value="139217">
                <text:p>139217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73361">
                <text:p>73361</text:p>
              </table:table-cell>
              <table:table-cell office:value-type="float" office:value="150237">
                <text:p>15023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75115">
                <text:p>75115</text:p>
              </table:table-cell>
              <table:table-cell office:value-type="float" office:value="166239">
                <text:p>166239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76247">
                <text:p>76247</text:p>
              </table:table-cell>
              <table:table-cell office:value-type="float" office:value="175212">
                <text:p>175212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86678">
                <text:p>86678</text:p>
              </table:table-cell>
              <table:table-cell office:value-type="float" office:value="203579">
                <text:p>203579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89234">
                <text:p>89234</text:p>
              </table:table-cell>
              <table:table-cell office:value-type="float" office:value="221273">
                <text:p>221273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92140">
                <text:p>92140</text:p>
              </table:table-cell>
              <table:table-cell office:value-type="float" office:value="231810">
                <text:p>231810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02569">
                <text:p>102569</text:p>
              </table:table-cell>
              <table:table-cell office:value-type="float" office:value="233539">
                <text:p>233539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02609">
                <text:p>102609</text:p>
              </table:table-cell>
              <table:table-cell office:value-type="float" office:value="235802">
                <text:p>235802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105277">
                <text:p>105277</text:p>
              </table:table-cell>
              <table:table-cell office:value-type="float" office:value="242213">
                <text:p>242213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09747">
                <text:p>109747</text:p>
              </table:table-cell>
              <table:table-cell office:value-type="float" office:value="255673">
                <text:p>25567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10708">
                <text:p>110708</text:p>
              </table:table-cell>
              <table:table-cell office:value-type="float" office:value="266474">
                <text:p>266474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10708">
                <text:p>110708</text:p>
              </table:table-cell>
              <table:table-cell office:value-type="float" office:value="266474">
                <text:p>266474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15974">
                <text:p>115974</text:p>
              </table:table-cell>
              <table:table-cell office:value-type="float" office:value="282504">
                <text:p>282504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14247">
                <text:p>114247</text:p>
              </table:table-cell>
              <table:table-cell office:value-type="float" office:value="291415">
                <text:p>29141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06761">
                <text:p>106761</text:p>
              </table:table-cell>
              <table:table-cell office:value-type="float" office:value="296131">
                <text:p>296131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17544">
                <text:p>117544</text:p>
              </table:table-cell>
              <table:table-cell office:value-type="float" office:value="316565">
                <text:p>316565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23851">
                <text:p>123851</text:p>
              </table:table-cell>
              <table:table-cell office:value-type="float" office:value="327300">
                <text:p>327300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27369">
                <text:p>127369</text:p>
              </table:table-cell>
              <table:table-cell office:value-type="float" office:value="332569">
                <text:p>332569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33941">
                <text:p>133941</text:p>
              </table:table-cell>
              <table:table-cell office:value-type="float" office:value="339686">
                <text:p>339686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36223">
                <text:p>136223</text:p>
              </table:table-cell>
              <table:table-cell office:value-type="float" office:value="344426">
                <text:p>344426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39650">
                <text:p>139650</text:p>
              </table:table-cell>
              <table:table-cell office:value-type="float" office:value="350336">
                <text:p>350336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39101">
                <text:p>139101</text:p>
              </table:table-cell>
              <table:table-cell office:value-type="float" office:value="362631">
                <text:p>362631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42386">
                <text:p>142386</text:p>
              </table:table-cell>
              <table:table-cell office:value-type="float" office:value="377059">
                <text:p>377059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43172">
                <text:p>143172</text:p>
              </table:table-cell>
              <table:table-cell office:value-type="float" office:value="379712">
                <text:p>37971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44350">
                <text:p>144350</text:p>
              </table:table-cell>
              <table:table-cell office:value-type="float" office:value="395279">
                <text:p>395279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46277">
                <text:p>146277</text:p>
              </table:table-cell>
              <table:table-cell office:value-type="float" office:value="401906">
                <text:p>401906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52736">
                <text:p>152736</text:p>
              </table:table-cell>
              <table:table-cell office:value-type="float" office:value="418491">
                <text:p>418491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59940">
                <text:p>159940</text:p>
              </table:table-cell>
              <table:table-cell office:value-type="float" office:value="440975">
                <text:p>44097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61973">
                <text:p>161973</text:p>
              </table:table-cell>
              <table:table-cell office:value-type="float" office:value="460796">
                <text:p>460796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69693">
                <text:p>169693</text:p>
              </table:table-cell>
              <table:table-cell office:value-type="float" office:value="470815">
                <text:p>470815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77854">
                <text:p>177854</text:p>
              </table:table-cell>
              <table:table-cell office:value-type="float" office:value="484687">
                <text:p>48468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77089">
                <text:p>177089</text:p>
              </table:table-cell>
              <table:table-cell office:value-type="float" office:value="486752">
                <text:p>486752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78464">
                <text:p>178464</text:p>
              </table:table-cell>
              <table:table-cell office:value-type="float" office:value="490620">
                <text:p>49062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81412">
                <text:p>181412</text:p>
              </table:table-cell>
              <table:table-cell office:value-type="float" office:value="493677">
                <text:p>49367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82822">
                <text:p>182822</text:p>
              </table:table-cell>
              <table:table-cell office:value-type="float" office:value="496731">
                <text:p>496731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83045">
                <text:p>183045</text:p>
              </table:table-cell>
              <table:table-cell office:value-type="float" office:value="494210">
                <text:p>494210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85783">
                <text:p>185783</text:p>
              </table:table-cell>
              <table:table-cell office:value-type="float" office:value="498812">
                <text:p>498812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182764">
                <text:p>182764</text:p>
              </table:table-cell>
              <table:table-cell office:value-type="float" office:value="500068">
                <text:p>500068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85364">
                <text:p>185364</text:p>
              </table:table-cell>
              <table:table-cell office:value-type="float" office:value="506466">
                <text:p>506466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185917">
                <text:p>185917</text:p>
              </table:table-cell>
              <table:table-cell office:value-type="float" office:value="513990">
                <text:p>513990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187274">
                <text:p>187274</text:p>
              </table:table-cell>
              <table:table-cell office:value-type="float" office:value="516578">
                <text:p>516578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188853.294117647">
                <text:p>188853.294117647</text:p>
              </table:table-cell>
              <table:table-cell office:value-type="float" office:value="521598.176470588">
                <text:p>521598.176470588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190432.588235294">
                <text:p>190432.588235294</text:p>
              </table:table-cell>
              <table:table-cell office:value-type="float" office:value="526618.352941177">
                <text:p>526618.352941177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192011.882352941">
                <text:p>192011.882352941</text:p>
              </table:table-cell>
              <table:table-cell office:value-type="float" office:value="531638.529411765">
                <text:p>531638.529411765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93591.176470588">
                <text:p>193591.176470588</text:p>
              </table:table-cell>
              <table:table-cell office:value-type="float" office:value="536658.705882353">
                <text:p>536658.70588235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195170.470588235">
                <text:p>195170.470588235</text:p>
              </table:table-cell>
              <table:table-cell office:value-type="float" office:value="541678.882352941">
                <text:p>541678.882352941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96749.764705882">
                <text:p>196749.764705882</text:p>
              </table:table-cell>
              <table:table-cell office:value-type="float" office:value="546699.058823529">
                <text:p>546699.058823529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198329.058823529">
                <text:p>198329.058823529</text:p>
              </table:table-cell>
              <table:table-cell office:value-type="float" office:value="551719.235294118">
                <text:p>551719.235294118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199908.352941176">
                <text:p>199908.352941176</text:p>
              </table:table-cell>
              <table:table-cell office:value-type="float" office:value="556739.411764706">
                <text:p>556739.411764706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201487.647058824">
                <text:p>201487.647058824</text:p>
              </table:table-cell>
              <table:table-cell office:value-type="float" office:value="561759.588235294">
                <text:p>561759.588235294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203066.941176471">
                <text:p>203066.941176471</text:p>
              </table:table-cell>
              <table:table-cell office:value-type="float" office:value="566779.764705882">
                <text:p>566779.764705882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204646.235294118">
                <text:p>204646.235294118</text:p>
              </table:table-cell>
              <table:table-cell office:value-type="float" office:value="571799.941176471">
                <text:p>571799.941176471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06225.529411765">
                <text:p>206225.529411765</text:p>
              </table:table-cell>
              <table:table-cell office:value-type="float" office:value="576820.117647059">
                <text:p>576820.117647059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207804.823529412">
                <text:p>207804.823529412</text:p>
              </table:table-cell>
              <table:table-cell office:value-type="float" office:value="581840.294117647">
                <text:p>581840.294117647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209384.117647059">
                <text:p>209384.117647059</text:p>
              </table:table-cell>
              <table:table-cell office:value-type="float" office:value="586860.470588235">
                <text:p>586860.470588235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210963.411764706">
                <text:p>210963.411764706</text:p>
              </table:table-cell>
              <table:table-cell office:value-type="float" office:value="591880.647058824">
                <text:p>591880.647058824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212542.705882353">
                <text:p>212542.705882353</text:p>
              </table:table-cell>
              <table:table-cell office:value-type="float" office:value="596900.823529412">
                <text:p>596900.82352941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14122">
                <text:p>214122</text:p>
              </table:table-cell>
              <table:table-cell office:value-type="float" office:value="601921">
                <text:p>601921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215701.294117647">
                <text:p>215701.294117647</text:p>
              </table:table-cell>
              <table:table-cell office:value-type="float" office:value="606941.176470588">
                <text:p>606941.176470588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217280.588235294">
                <text:p>217280.588235294</text:p>
              </table:table-cell>
              <table:table-cell office:value-type="float" office:value="611961.352941177">
                <text:p>611961.352941177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218859.882352941">
                <text:p>218859.882352941</text:p>
              </table:table-cell>
              <table:table-cell office:value-type="float" office:value="616981.529411765">
                <text:p>616981.529411765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220439.176470588">
                <text:p>220439.176470588</text:p>
              </table:table-cell>
              <table:table-cell office:value-type="float" office:value="622001.705882353">
                <text:p>622001.705882353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222018.470588235">
                <text:p>222018.470588235</text:p>
              </table:table-cell>
              <table:table-cell office:value-type="float" office:value="627021.882352941">
                <text:p>627021.882352941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223597.764705882">
                <text:p>223597.764705882</text:p>
              </table:table-cell>
              <table:table-cell office:value-type="float" office:value="632042.058823529">
                <text:p>632042.058823529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225177.058823529">
                <text:p>225177.058823529</text:p>
              </table:table-cell>
              <table:table-cell office:value-type="float" office:value="637062.235294118">
                <text:p>637062.235294118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226756.352941176">
                <text:p>226756.352941176</text:p>
              </table:table-cell>
              <table:table-cell office:value-type="float" office:value="642082.411764706">
                <text:p>642082.411764706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228335.647058824">
                <text:p>228335.647058824</text:p>
              </table:table-cell>
              <table:table-cell office:value-type="float" office:value="647102.588235294">
                <text:p>647102.588235294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229914.941176471">
                <text:p>229914.941176471</text:p>
              </table:table-cell>
              <table:table-cell office:value-type="float" office:value="652122.764705882">
                <text:p>652122.764705882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231494.235294118">
                <text:p>231494.235294118</text:p>
              </table:table-cell>
              <table:table-cell office:value-type="float" office:value="657142.941176471">
                <text:p>657142.941176471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233073.529411765">
                <text:p>233073.529411765</text:p>
              </table:table-cell>
              <table:table-cell office:value-type="float" office:value="662163.117647059">
                <text:p>662163.117647059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234652.823529412">
                <text:p>234652.823529412</text:p>
              </table:table-cell>
              <table:table-cell office:value-type="float" office:value="667183.294117647">
                <text:p>667183.294117647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236232.117647059">
                <text:p>236232.117647059</text:p>
              </table:table-cell>
              <table:table-cell office:value-type="float" office:value="672203.470588235">
                <text:p>672203.470588235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237811.411764706">
                <text:p>237811.411764706</text:p>
              </table:table-cell>
              <table:table-cell office:value-type="float" office:value="677223.647058824">
                <text:p>677223.647058824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239390.705882353">
                <text:p>239390.705882353</text:p>
              </table:table-cell>
              <table:table-cell office:value-type="float" office:value="682243.823529412">
                <text:p>682243.823529412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240970">
                <text:p>240970</text:p>
              </table:table-cell>
              <table:table-cell office:value-type="float" office:value="687264">
                <text:p>68726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246678">
                <text:p>246678</text:p>
              </table:table-cell>
              <table:table-cell office:value-type="float" office:value="720361">
                <text:p>720361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246688">
                <text:p>246688</text:p>
              </table:table-cell>
              <table:table-cell office:value-type="float" office:value="721253">
                <text:p>721253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246974">
                <text:p>246974</text:p>
              </table:table-cell>
              <table:table-cell office:value-type="float" office:value="748166">
                <text:p>748166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247059">
                <text:p>247059</text:p>
              </table:table-cell>
              <table:table-cell office:value-type="float" office:value="749556">
                <text:p>74955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249176">
                <text:p>249176</text:p>
              </table:table-cell>
              <table:table-cell office:value-type="float" office:value="755025">
                <text:p>755025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50568">
                <text:p>250568</text:p>
              </table:table-cell>
              <table:table-cell office:value-type="float" office:value="758935">
                <text:p>758935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250690">
                <text:p>250690</text:p>
              </table:table-cell>
              <table:table-cell office:value-type="float" office:value="762101">
                <text:p>762101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250737">
                <text:p>250737</text:p>
              </table:table-cell>
              <table:table-cell office:value-type="float" office:value="762383">
                <text:p>762383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255172">
                <text:p>255172</text:p>
              </table:table-cell>
              <table:table-cell office:value-type="float" office:value="783816">
                <text:p>78381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55029">
                <text:p>255029</text:p>
              </table:table-cell>
              <table:table-cell office:value-type="float" office:value="787059">
                <text:p>78705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55311">
                <text:p>255311</text:p>
              </table:table-cell>
              <table:table-cell office:value-type="float" office:value="791313">
                <text:p>79131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55422">
                <text:p>255422</text:p>
              </table:table-cell>
              <table:table-cell office:value-type="float" office:value="794010">
                <text:p>7940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56132">
                <text:p>256132</text:p>
              </table:table-cell>
              <table:table-cell office:value-type="float" office:value="795470">
                <text:p>79547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54093">
                <text:p>254093</text:p>
              </table:table-cell>
              <table:table-cell office:value-type="float" office:value="794594">
                <text:p>79459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54866">
                <text:p>254866</text:p>
              </table:table-cell>
              <table:table-cell office:value-type="float" office:value="800002">
                <text:p>80000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55443">
                <text:p>255443</text:p>
              </table:table-cell>
              <table:table-cell office:value-type="float" office:value="801001">
                <text:p>80100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57364">
                <text:p>257364</text:p>
              </table:table-cell>
              <table:table-cell office:value-type="float" office:value="807817">
                <text:p>807817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59469">
                <text:p>259469</text:p>
              </table:table-cell>
              <table:table-cell office:value-type="float" office:value="811611">
                <text:p>81161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259518">
                <text:p>259518</text:p>
              </table:table-cell>
              <table:table-cell office:value-type="float" office:value="815857">
                <text:p>815857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259518">
                <text:p>259518</text:p>
              </table:table-cell>
              <table:table-cell office:value-type="float" office:value="815857">
                <text:p>815857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259518">
                <text:p>259518</text:p>
              </table:table-cell>
              <table:table-cell office:value-type="float" office:value="815857">
                <text:p>815857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66470">
                <text:p>266470</text:p>
              </table:table-cell>
              <table:table-cell office:value-type="float" office:value="838895">
                <text:p>838895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266470">
                <text:p>266470</text:p>
              </table:table-cell>
              <table:table-cell office:value-type="float" office:value="838895">
                <text:p>838895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266470">
                <text:p>266470</text:p>
              </table:table-cell>
              <table:table-cell office:value-type="float" office:value="838895">
                <text:p>838895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266470">
                <text:p>266470</text:p>
              </table:table-cell>
              <table:table-cell office:value-type="float" office:value="838895">
                <text:p>838895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266470">
                <text:p>266470</text:p>
              </table:table-cell>
              <table:table-cell office:value-type="float" office:value="838895">
                <text:p>838895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266470">
                <text:p>266470</text:p>
              </table:table-cell>
              <table:table-cell office:value-type="float" office:value="838895">
                <text:p>838895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266470">
                <text:p>266470</text:p>
              </table:table-cell>
              <table:table-cell office:value-type="float" office:value="838895">
                <text:p>83889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266470">
                <text:p>266470</text:p>
              </table:table-cell>
              <table:table-cell office:value-type="float" office:value="838895">
                <text:p>83889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266470">
                <text:p>266470</text:p>
              </table:table-cell>
              <table:table-cell office:value-type="float" office:value="838895">
                <text:p>838895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266470">
                <text:p>266470</text:p>
              </table:table-cell>
              <table:table-cell office:value-type="float" office:value="838895">
                <text:p>83889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66470">
                <text:p>266470</text:p>
              </table:table-cell>
              <table:table-cell office:value-type="float" office:value="838895">
                <text:p>838895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66470">
                <text:p>266470</text:p>
              </table:table-cell>
              <table:table-cell office:value-type="float" office:value="838895">
                <text:p>838895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271961">
                <text:p>271961</text:p>
              </table:table-cell>
              <table:table-cell office:value-type="float" office:value="863738">
                <text:p>863738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271961">
                <text:p>271961</text:p>
              </table:table-cell>
              <table:table-cell office:value-type="float" office:value="863738">
                <text:p>863738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271961">
                <text:p>271961</text:p>
              </table:table-cell>
              <table:table-cell office:value-type="float" office:value="863738">
                <text:p>863738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271961">
                <text:p>271961</text:p>
              </table:table-cell>
              <table:table-cell office:value-type="float" office:value="863738">
                <text:p>863738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271961">
                <text:p>271961</text:p>
              </table:table-cell>
              <table:table-cell office:value-type="float" office:value="863738">
                <text:p>863738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271961">
                <text:p>271961</text:p>
              </table:table-cell>
              <table:table-cell office:value-type="float" office:value="863738">
                <text:p>863738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271961">
                <text:p>271961</text:p>
              </table:table-cell>
              <table:table-cell office:value-type="float" office:value="863738">
                <text:p>863738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271961">
                <text:p>271961</text:p>
              </table:table-cell>
              <table:table-cell office:value-type="float" office:value="863738">
                <text:p>863738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271961">
                <text:p>271961</text:p>
              </table:table-cell>
              <table:table-cell office:value-type="float" office:value="863738">
                <text:p>863738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271961">
                <text:p>271961</text:p>
              </table:table-cell>
              <table:table-cell office:value-type="float" office:value="863738">
                <text:p>863738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271961">
                <text:p>271961</text:p>
              </table:table-cell>
              <table:table-cell office:value-type="float" office:value="863738">
                <text:p>863738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271961">
                <text:p>271961</text:p>
              </table:table-cell>
              <table:table-cell office:value-type="float" office:value="863738">
                <text:p>863738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275625">
                <text:p>275625</text:p>
              </table:table-cell>
              <table:table-cell office:value-type="float" office:value="889043">
                <text:p>889043</text:p>
              </table:table-cell>
            </table:table-row>
            <table:table-row>
              <table:table-cell office:value-type="float" office:value="45017">
                <text:p>45017</text:p>
              </table:table-cell>
              <table:table-cell office:value-type="float" office:value="275624">
                <text:p>275624</text:p>
              </table:table-cell>
              <table:table-cell office:value-type="float" office:value="889540">
                <text:p>889540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275679">
                <text:p>275679</text:p>
              </table:table-cell>
              <table:table-cell office:value-type="float" office:value="890347">
                <text:p>890347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275703">
                <text:p>275703</text:p>
              </table:table-cell>
              <table:table-cell office:value-type="float" office:value="891703">
                <text:p>891703</text:p>
              </table:table-cell>
            </table:table-row>
            <table:table-row>
              <table:table-cell office:value-type="float" office:value="45108">
                <text:p>45108</text:p>
              </table:table-cell>
              <table:table-cell office:value-type="float" office:value="275752">
                <text:p>275752</text:p>
              </table:table-cell>
              <table:table-cell office:value-type="float" office:value="892641">
                <text:p>892641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276026">
                <text:p>276026</text:p>
              </table:table-cell>
              <table:table-cell office:value-type="float" office:value="894735">
                <text:p>894735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276316">
                <text:p>276316</text:p>
              </table:table-cell>
              <table:table-cell office:value-type="float" office:value="896196">
                <text:p>896196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276327">
                <text:p>276327</text:p>
              </table:table-cell>
              <table:table-cell office:value-type="float" office:value="896209">
                <text:p>896209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276377">
                <text:p>276377</text:p>
              </table:table-cell>
              <table:table-cell office:value-type="float" office:value="896654">
                <text:p>896654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276466">
                <text:p>276466</text:p>
              </table:table-cell>
              <table:table-cell office:value-type="float" office:value="898062">
                <text:p>898062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276647">
                <text:p>276647</text:p>
              </table:table-cell>
              <table:table-cell office:value-type="float" office:value="898806">
                <text:p>898806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277533">
                <text:p>277533</text:p>
              </table:table-cell>
              <table:table-cell office:value-type="float" office:value="901374">
                <text:p>901374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277962">
                <text:p>277962</text:p>
              </table:table-cell>
              <table:table-cell office:value-type="float" office:value="902994">
                <text:p>902994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78032">
                <text:p>278032</text:p>
              </table:table-cell>
              <table:table-cell office:value-type="float" office:value="903327">
                <text:p>903327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278037">
                <text:p>278037</text:p>
              </table:table-cell>
              <table:table-cell office:value-type="float" office:value="903343">
                <text:p>903343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278049">
                <text:p>278049</text:p>
              </table:table-cell>
              <table:table-cell office:value-type="float" office:value="903908">
                <text:p>903908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278078">
                <text:p>278078</text:p>
              </table:table-cell>
              <table:table-cell office:value-type="float" office:value="904184">
                <text:p>904184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278078">
                <text:p>278078</text:p>
              </table:table-cell>
              <table:table-cell office:value-type="float" office:value="904278">
                <text:p>904278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278490">
                <text:p>278490</text:p>
              </table:table-cell>
              <table:table-cell office:value-type="float" office:value="906185">
                <text:p>906185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278495">
                <text:p>278495</text:p>
              </table:table-cell>
              <table:table-cell office:value-type="float" office:value="909807">
                <text:p>909807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278501">
                <text:p>278501</text:p>
              </table:table-cell>
              <table:table-cell office:value-type="float" office:value="910072">
                <text:p>910072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278528">
                <text:p>278528</text:p>
              </table:table-cell>
              <table:table-cell office:value-type="float" office:value="1013792">
                <text:p>1013792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278730">
                <text:p>278730</text:p>
              </table:table-cell>
              <table:table-cell office:value-type="float" office:value="1016501">
                <text:p>1016501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278950">
                <text:p>278950</text:p>
              </table:table-cell>
              <table:table-cell office:value-type="float" office:value="1017454">
                <text:p>1017454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277631">
                <text:p>277631</text:p>
              </table:table-cell>
              <table:table-cell office:value-type="float" office:value="1021119">
                <text:p>1021119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277794">
                <text:p>277794</text:p>
              </table:table-cell>
              <table:table-cell office:value-type="float" office:value="1023826">
                <text:p>1023826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277954">
                <text:p>277954</text:p>
              </table:table-cell>
              <table:table-cell office:value-type="float" office:value="1024469">
                <text:p>1024469</text:p>
              </table:table-cell>
            </table:table-row>
            <table:table-row>
              <table:table-cell office:value-type="float" office:value="45809">
                <text:p>45809</text:p>
              </table:table-cell>
              <table:table-cell office:value-type="float" office:value="277960">
                <text:p>277960</text:p>
              </table:table-cell>
              <table:table-cell office:value-type="float" office:value="1024688">
                <text:p>1024688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278694">
                <text:p>278694</text:p>
              </table:table-cell>
              <table:table-cell office:value-type="float" office:value="1026434">
                <text:p>1026434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278707">
                <text:p>278707</text:p>
              </table:table-cell>
              <table:table-cell office:value-type="float" office:value="1026378">
                <text:p>1026378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278951">
                <text:p>278951</text:p>
              </table:table-cell>
              <table:table-cell office:value-type="float" office:value="1026795">
                <text:p>1026795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278961">
                <text:p>278961</text:p>
              </table:table-cell>
              <table:table-cell office:value-type="float" office:value="1026848">
                <text:p>1026848</text:p>
              </table:table-cell>
            </table:table-row>
            <table:table-row>
              <table:table-cell office:value-type="float" office:value="45962">
                <text:p>45962</text:p>
              </table:table-cell>
              <table:table-cell office:value-type="float" office:value="279213">
                <text:p>279213</text:p>
              </table:table-cell>
              <table:table-cell office:value-type="float" office:value="1027268">
                <text:p>1027268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279653">
                <text:p>279653</text:p>
              </table:table-cell>
              <table:table-cell office:value-type="float" office:value="1030404">
                <text:p>1030404</text:p>
              </table:table-cell>
            </table:table-row>
            <table:table-row>
              <table:table-cell office:value-type="float" office:value="46023">
                <text:p>46023</text:p>
              </table:table-cell>
              <table:table-cell office:value-type="float" office:value="279994">
                <text:p>279994</text:p>
              </table:table-cell>
              <table:table-cell office:value-type="float" office:value="1032024">
                <text:p>1032024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279991">
                <text:p>279991</text:p>
              </table:table-cell>
              <table:table-cell office:value-type="float" office:value="1032396">
                <text:p>1032396</text:p>
              </table:table-cell>
            </table:table-row>
            <table:table-row>
              <table:table-cell office:value-type="float" office:value="46082">
                <text:p>46082</text:p>
              </table:table-cell>
              <table:table-cell office:value-type="float" office:value="280013">
                <text:p>280013</text:p>
              </table:table-cell>
              <table:table-cell office:value-type="float" office:value="1035501">
                <text:p>1035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